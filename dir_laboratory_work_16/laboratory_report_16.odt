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 style:master-page-name="Титульный_20_лист">
      <style:table-properties style:width="17.978cm" style:page-number="auto" table:align="right"/>
    </style:style>
    <style:style style:name="Таблица1.A" style:family="table-column">
      <style:table-column-properties style:column-width="17.978cm"/>
    </style:style>
    <style:style style:name="Таблица1.A1" style:family="table-cell">
      <style:table-cell-properties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fo:color="#111111" loext:opacity="100%" style:font-name="Liberation Serif1" officeooo:rsid="0013d4ff" officeooo:paragraph-rsid="00150974"/>
    </style:style>
    <style:style style:name="P2" style:family="paragraph" style:parent-style-name="Standard">
      <style:text-properties officeooo:paragraph-rsid="00150974"/>
    </style:style>
    <style:style style:name="P3" style:family="paragraph" style:parent-style-name="Title">
      <style:text-properties fo:color="#111111" loext:opacity="100%" style:font-name="Liberation Serif1" officeooo:rsid="0015098b" officeooo:paragraph-rsid="00150974"/>
    </style:style>
    <style:style style:name="P4" style:family="paragraph" style:parent-style-name="Standard">
      <style:text-properties fo:color="#111111" loext:opacity="100%" style:font-name="Liberation Serif1" officeooo:paragraph-rsid="00150974"/>
    </style:style>
    <style:style style:name="P5" style:family="paragraph" style:parent-style-name="Subtitle">
      <style:text-properties fo:color="#111111" loext:opacity="100%" style:font-name="Liberation Serif1" officeooo:paragraph-rsid="00150974"/>
    </style:style>
    <style:style style:name="P6" style:family="paragraph" style:parent-style-name="Text_20_body">
      <style:text-properties fo:color="#111111" loext:opacity="100%" style:font-name="Liberation Serif1" fo:language="en" fo:country="US" officeooo:rsid="0015098b" officeooo:paragraph-rsid="00150974"/>
    </style:style>
    <style:style style:name="P7" style:family="paragraph" style:parent-style-name="Table_20_Contents">
      <style:text-properties fo:color="#111111" loext:opacity="100%" style:font-name="Liberation Serif1" officeooo:rsid="0015098b" officeooo:paragraph-rsid="00150974"/>
    </style:style>
    <style:style style:name="P8" style:family="paragraph" style:parent-style-name="Table_20_Contents">
      <style:text-properties fo:color="#111111" loext:opacity="100%" style:font-name="Liberation Serif1" officeooo:paragraph-rsid="00150974"/>
    </style:style>
    <style:style style:name="P9" style:family="paragraph" style:parent-style-name="Содержимое_20_таблицы_20_по_20_центру">
      <style:text-properties fo:color="#111111" loext:opacity="100%" style:font-name="Liberation Serif1" fo:language="ru" fo:country="RU" officeooo:rsid="00057a0e" officeooo:paragraph-rsid="00150974"/>
    </style:style>
    <style:style style:name="P10" style:family="paragraph" style:parent-style-name="Примечание">
      <style:text-properties fo:color="#111111" loext:opacity="100%" style:font-name="Liberation Serif1" officeooo:paragraph-rsid="00150974"/>
    </style:style>
    <style:style style:name="P11" style:family="paragraph" style:parent-style-name="Примечание">
      <style:text-properties fo:color="#111111" loext:opacity="100%" style:font-name="Liberation Serif1" officeooo:rsid="0015098b" officeooo:paragraph-rsid="00150974"/>
    </style:style>
    <style:style style:name="P12" style:family="paragraph" style:parent-style-name="Содержимое_20_таблицы_20_по_20_центру">
      <style:text-properties fo:color="#111111" loext:opacity="100%" style:font-name="Liberation Serif1" officeooo:rsid="0017c942" officeooo:paragraph-rsid="00150974"/>
    </style:style>
    <style:style style:name="P13" style:family="paragraph" style:parent-style-name="Standard">
      <style:text-properties fo:color="#111111" loext:opacity="100%" style:font-name="Liberation Serif1" fo:language="en" fo:country="US" officeooo:rsid="0015098b" officeooo:paragraph-rsid="00150974"/>
    </style:style>
    <style:style style:name="P14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officeooo:paragraph-rsid="00150974"/>
    </style:style>
    <style:style style:name="T1" style:family="text">
      <style:text-properties fo:language="en" fo:country="US" officeooo:rsid="00164d26"/>
    </style:style>
    <style:style style:name="T2" style:family="text">
      <style:text-properties fo:language="en" fo:country="US" officeooo:rsid="00150974"/>
    </style:style>
    <style:style style:name="T3" style:family="text">
      <style:text-properties fo:language="en" fo:country="US" officeooo:rsid="0015098b"/>
    </style:style>
    <style:style style:name="T4" style:family="text">
      <style:text-properties fo:language="ru" fo:country="RU" officeooo:rsid="0026890a"/>
    </style:style>
    <style:style style:name="T5" style:family="text">
      <style:text-properties fo:language="ru" fo:country="RU" officeooo:rsid="0021bbb4"/>
    </style:style>
    <style:style style:name="T6" style:family="text">
      <style:text-properties fo:language="ru" fo:country="RU" officeooo:rsid="00194abe"/>
    </style:style>
    <style:style style:name="T7" style:family="text">
      <style:text-properties fo:language="en" fo:country="US" officeooo:rsid="00194abe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ФАКУЛЬТЕТ</text:p>
          </table:table-cell>
        </table:table-row>
        <table:table-row>
          <table:table-cell table:style-name="Таблица1.A1" office:value-type="string">
            <text:p text:style-name="P1">КАФЕДРА</text:p>
          </table:table-cell>
        </table:table-row>
      </table:table>
      <text:p text:style-name="P2"/>
      <text:p text:style-name="P2"/>
      <text:p text:style-name="P2"/>
      <text:p text:style-name="P2"/>
      <text:p text:style-name="P3">ОТЧЕТ<text:line-break/>о лабораторной работе № <text:span text:style-name="T1">1</text:span><text:span text:style-name="T2">6</text:span></text:p>
      <text:p text:style-name="P4"/>
      <text:p text:style-name="P5"><text:span text:style-name="T3">«</text:span><text:span text:style-name="T4">Регулярные выражения</text:span><text:span text:style-name="T5"> в</text:span><text:span text:style-name="T6"> </text:span><text:span text:style-name="T7">Python</text:span><text:span text:style-name="T3">»</text:span></text:p>
      <text:p text:style-name="P6"/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7">Выполнил</text:p>
          </table:table-cell>
          <table:table-cell table:style-name="Таблица3.B1" office:value-type="string">
            <text:p text:style-name="P7">студент группы ИУ10-<text:span text:style-name="T1">4</text:span>9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9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группа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  <table:table-row>
          <table:table-cell table:style-name="Таблица3.A1" office:value-type="string">
            <text:p text:style-name="P7">Проверил</text:p>
          </table:table-cell>
          <table:table-cell table:style-name="Таблица3.B1" office:value-type="string">
            <text:p text:style-name="P7">ассистент кафедры ИУ10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12">М.А. Наткин</text:p>
          </table:table-cell>
        </table:table-row>
        <table:table-row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4"><text:a xlink:type="simple" xlink:href="#__RefHeading___Toc925_2786680863" office:name="Постановка задачи" text:style-name="Index_20_Link" text:visited-style-name="Index_20_Link">Постановка задачи<text:tab/>3</text:a></text:p>
          <text:p text:style-name="P14"><text:a xlink:type="simple" xlink:href="#__RefHeading___Toc927_2786680863" office:name="Теоретическая часть" text:style-name="Index_20_Link" text:visited-style-name="Index_20_Link">Теоретическая часть<text:tab/>3</text:a></text:p>
          <text:p text:style-name="P14"><text:a xlink:type="simple" xlink:href="#__RefHeading___Toc929_2786680863" office:name="Пример входного файла (input.txt)" text:style-name="Index_20_Link" text:visited-style-name="Index_20_Link">Пример входного файла (input.txt)<text:tab/>4</text:a></text:p>
          <text:p text:style-name="P14"><text:a xlink:type="simple" xlink:href="#__RefHeading___Toc931_2786680863" office:name="Листинг программы" text:style-name="Index_20_Link" text:visited-style-name="Index_20_Link">Листинг программы<text:tab/>4</text:a></text:p>
          <text:p text:style-name="P14"><text:a xlink:type="simple" xlink:href="#__RefHeading___Toc933_2786680863" office:name=" Список использованной литературы и материалов" text:style-name="Index_20_Link" text:visited-style-name="Index_20_Link"><text:s/>Список использованной литературы и материалов<text:tab/>4</text:a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5" text:outline-level="1" text:is-list-header="true"><text:bookmark-start text:name="__RefHeading___Toc925_2786680863"/><text:soft-page-break/>Постановка задачи<text:bookmark-end text:name="__RefHeading___Toc925_2786680863"/></text:h>
      <text:p text:style-name="Text_20_body"/>
      <text:p text:style-name="Text_20_body">1. Написать программу на языке программирования Python, которая с помощью регулярных выражений извлекает из файла input.txt следующие данные:</text:p>
      <text:p text:style-name="Text_20_body"><text:s text:c="3"/>- IP-адреса;</text:p>
      <text:p text:style-name="Text_20_body"><text:s text:c="3"/>- коды ошибок (коды HTTP-ответов);</text:p>
      <text:p text:style-name="Text_20_body"><text:s text:c="3"/>- метод и URL.</text:p>
      <text:p text:style-name="Text_20_body">2. Оформить отчет.</text:p>
      <text:h text:style-name="Heading_20_1" text:outline-level="1"><text:bookmark-start text:name="__RefHeading___Toc927_2786680863"/>Теоретическая часть<text:bookmark-end text:name="__RefHeading___Toc927_2786680863"/></text:h>
      <text:p text:style-name="Text_20_body">Регулярные выражения (Regular Expressions, regex) — это мощный инструмент для поиска, извлечения и замены текста по заданным шаблонам. В Python регулярные выражения реализованы в модуле re.</text:p>
      <text:p text:style-name="Text_20_body">Основные метасимволы и конструкции:</text:p>
      <text:p text:style-name="Text_20_body">- \d — любая цифра (0-9)</text:p>
      <text:p text:style-name="Text_20_body">- \w — любая буква, цифра или знак подчеркивания</text:p>
      <text:p text:style-name="Text_20_body">- \s — любой пробельный символ</text:p>
      <text:p text:style-name="Text_20_body">- . — любой символ, кроме перевода строки</text:p>
      <text:p text:style-name="Text_20_body">- * — предыдущий символ повторяется 0 или более раз</text:p>
      <text:p text:style-name="Text_20_body">- + — предыдущий символ повторяется 1 или более раз</text:p>
      <text:p text:style-name="Text_20_body">- ? — предыдущий символ повторяется 0 или 1 раз</text:p>
      <text:p text:style-name="Text_20_body">- {n} — предыдущий символ повторяется ровно n раз</text:p>
      <text:p text:style-name="Text_20_body">- {n,m} — предыдущий символ повторяется от n до m раз</text:p>
      <text:p text:style-name="Text_20_body">- [] — набор допустимых символов</text:p>
      <text:p text:style-name="Text_20_body">- () — группа для извлечения подстроки</text:p>
      <text:p text:style-name="Text_20_body">- | — логическое ИЛИ</text:p>
      <text:p text:style-name="Text_20_body"/>
      <text:p text:style-name="Text_20_body">Основные функции модуля re:</text:p>
      <text:p text:style-name="Text_20_body">- re.search(pattern, string) — ищет первое совпадение</text:p>
      <text:p text:style-name="Text_20_body"><text:soft-page-break/>- re.findall(pattern, string) — возвращает все совпадения в виде списка</text:p>
      <text:p text:style-name="Text_20_body">- re.finditer(pattern, string) — возвращает итератор по всем совпадениям</text:p>
      <text:p text:style-name="Text_20_body">- re.sub(pattern, repl, string) — заменяет совпадения</text:p>
      <text:p text:style-name="Text_20_body">- re.compile(pattern) — компилирует регулярное выражение для многократного использования</text:p>
      <text:h text:style-name="Heading_20_1" text:outline-level="1"><text:bookmark-start text:name="__RefHeading___Toc929_2786680863"/>Пример входного файла (input.txt)<text:bookmark-end text:name="__RefHeading___Toc929_2786680863"/></text:h>
      <text:p text:style-name="Text_20_body">192.168.1.10 - - [24/Nov/2026:20:56:01 +0300] "GET /index.html HTTP/1.1" 200 1024</text:p>
      <text:p text:style-name="Text_20_body">10.0.0.5 - - [30/Avg/2026:10:00:02 +0300] "POST /login.php HTTP/1.1" 401 512</text:p>
      <text:p text:style-name="Text_20_body">192.168.1.10 - - [18/Apr/2026:10:00:05 +0300] "GET /images/logo.png HTTP/1.1" 200 4500</text:p>
      <text:p text:style-name="Text_20_body">203.0.113.45 - - [06/Mar/2026:09:00:10 +0300] "GET /admin/dashboard HTTP/1.1" 403 2048</text:p>
      <text:p text:style-name="Text_20_body">172.16.0.1 - - [04/Dec/2026:10:00:15 +0300] "GET /api/data HTTP/1.1" 500 120</text:p>
      <text:h text:style-name="Heading_20_1" text:outline-level="1"><text:bookmark-start text:name="__RefHeading___Toc931_2786680863"/>Листинг программы<text:bookmark-end text:name="__RefHeading___Toc931_2786680863"/></text:h>
      <text:p text:style-name="Text_20_body">Исходный код программы размещён в репозитории GitHub:</text:p>
      <text:p text:style-name="Text_20_body">https://github.com/MRKoret/BMSTU_Python_Lebedev_A_V</text:p>
      <text:h text:style-name="Heading_20_1" text:outline-level="1"><text:bookmark-start text:name="__RefHeading___Toc933_2786680863"/><text:s/>Список использованной литературы и материалов<text:bookmark-end text:name="__RefHeading___Toc933_2786680863"/></text:h>
      <text:p text:style-name="Text_20_body"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p text:style-name="Text_20_body">2. Брюс М. Ван Хорн II, Куан Нгуен. PyCharm: профессиональная работа на Python / пер. с англ. И.Л. Люско. – М.:ДМК Пресс, 2024. – 618 с.: ил.</text:p>
      <text:p text:style-name="Text_20_body">3. Welcome to python.org. — Текст : электронный // The official home of the Python Programming Language : [сайт]. — URL: https://www.python.org/ (дата обращения: 14.09.2025).</text:p>
      <text:p text:style-name="Text_20_body">4. Git. — Текст : электронный // Git : [сайт]. — URL: https://git-scm.com/ (дата обращения: 14.09.2025).</text:p>
      <text:p text:style-name="Text_20_body"><text:soft-page-break/>5. GitHub. — Текст : электронный // GitHub : [сайт]. — URL: https://github.com/ (дата обращения: 14.09.2025).</text:p>
      <text:p text:style-name="Text_20_body">6. PyCharm: The only Python IDE you need. — Текст : электронный // JetBrains: Essential tools for software developers and teams : [сайт]. — URL: https://www.jetbrains.com/pycharm/ (дата обращения: 14.09.2025).</text:p>
      <text:p text:style-name="Text_20_body">7. Документация Python по модулю re. — Текст : электронный // Python.org : [сайт]. — URL: https://docs.python.org/3/library/re.html (дата обращения: 29.05.2026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7.999cm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fo:language="en" fo:country="US" officeooo:rsid="00164d26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<text:span text:style-name="MT1">6</text:span>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bookmark-start text:name="PageNumWizard_HEADER_Первая страница2 Копия 1"/><text:page-number text:select-page="current">2</text:page-number><text:bookmark-end text:name="PageNumWizard_HEADER_Первая страница2 Копия 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9T19:54:23.587524600</meta:creation-date>
    <dc:date>2026-05-29T20:05:25.066170500</dc:date>
    <meta:editing-duration>PT11M1S</meta:editing-duration>
    <meta:editing-cycles>1</meta:editing-cycles>
    <meta:document-statistic meta:table-count="3" meta:image-count="1" meta:object-count="0" meta:page-count="5" meta:paragraph-count="70" meta:word-count="490" meta:character-count="3687" meta:non-whitespace-character-count="3222"/>
    <meta:generator>LibreOffice/25.8.6.2$Windows_X86_64 LibreOffice_project/b4b39682cd9868fa725bc664aff94278d315bd04</meta:generator>
  </office:meta>
</office:document-meta>
</file>