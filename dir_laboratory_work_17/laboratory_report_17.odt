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_5f_1" style:display-name="Таблица2_1" style:family="table" style:master-page-name="Титульный_20_лист">
      <style:table-properties style:width="17.978cm" style:page-number="auto" table:align="right"/>
    </style:style>
    <style:style style:name="Таблица2_5f_1.A" style:display-name="Таблица2_1.A" style:family="table-column">
      <style:table-column-properties style:column-width="4.397cm"/>
    </style:style>
    <style:style style:name="Таблица2_5f_1.B" style:display-name="Таблица2_1.B" style:family="table-column">
      <style:table-column-properties style:column-width="13.58cm"/>
    </style:style>
    <style:style style:name="Таблица2_5f_1.A1" style:display-name="Таблица2_1.A1" style:family="table-cell">
      <style:table-cell-properties style:writing-mode="page"/>
    </style:style>
    <style:style style:name="Таблица2_5f_1.B1" style:display-name="Таблица2_1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4c23a"/>
    </style:style>
    <style:style style:name="P2" style:family="paragraph" style:parent-style-name="Содержимое_20_таблицы_20_по_20_центру">
      <style:text-properties officeooo:rsid="0017c942" officeooo:paragraph-rsid="0004c23a"/>
    </style:style>
    <style:style style:name="P3" style:family="paragraph" style:parent-style-name="Содержимое_20_таблицы_20_по_20_центру">
      <style:text-properties officeooo:rsid="00196614" officeooo:paragraph-rsid="0004c23a"/>
    </style:style>
    <style:style style:name="P4" style:family="paragraph" style:parent-style-name="Standard">
      <style:text-properties officeooo:paragraph-rsid="0004c23a"/>
    </style:style>
    <style:style style:name="P5" style:family="paragraph" style:parent-style-name="Title">
      <style:text-properties officeooo:rsid="0015098b" officeooo:paragraph-rsid="0004c23a"/>
    </style:style>
    <style:style style:name="P6" style:family="paragraph" style:parent-style-name="Subtitle">
      <style:text-properties fo:language="en" fo:country="US" officeooo:rsid="0015098b" officeooo:paragraph-rsid="0004c23a"/>
    </style:style>
    <style:style style:name="P7" style:family="paragraph" style:parent-style-name="Text_20_body">
      <style:text-properties fo:language="en" fo:country="US" officeooo:rsid="0015098b" officeooo:paragraph-rsid="0004c23a"/>
    </style:style>
    <style:style style:name="P8" style:family="paragraph" style:parent-style-name="Table_20_Contents">
      <style:text-properties officeooo:rsid="0015098b" officeooo:paragraph-rsid="0004c23a"/>
    </style:style>
    <style:style style:name="P9" style:family="paragraph" style:parent-style-name="Table_20_Contents">
      <style:text-properties officeooo:paragraph-rsid="0004c23a"/>
    </style:style>
    <style:style style:name="P10" style:family="paragraph" style:parent-style-name="Содержимое_20_таблицы_20_по_20_центру">
      <style:text-properties fo:language="ru" fo:country="RU" officeooo:rsid="00057a0e" officeooo:paragraph-rsid="0004c23a"/>
    </style:style>
    <style:style style:name="P11" style:family="paragraph" style:parent-style-name="Примечание">
      <style:text-properties officeooo:paragraph-rsid="0004c23a"/>
    </style:style>
    <style:style style:name="P12" style:family="paragraph" style:parent-style-name="Примечание">
      <style:text-properties officeooo:rsid="0015098b" officeooo:paragraph-rsid="0004c23a"/>
    </style:style>
    <style:style style:name="P13" style:family="paragraph" style:parent-style-name="Standard">
      <style:text-properties fo:language="en" fo:country="US" officeooo:rsid="0015098b" officeooo:paragraph-rsid="0004c23a"/>
    </style:style>
    <style:style style:name="P14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fo:language="en" fo:country="US" fo:font-style="italic" officeooo:rsid="0015098b" officeooo:paragraph-rsid="0004c23a" style:font-style-asian="italic" style:font-style-complex="italic"/>
    </style:style>
    <style:style style:name="P17" style:family="paragraph" style:parent-style-name="Standard">
      <style:text-properties fo:language="en" fo:country="US" officeooo:rsid="0015098b" officeooo:paragraph-rsid="00057cdc"/>
    </style:style>
    <style:style style:name="P18" style:family="paragraph" style:parent-style-name="Standard">
      <style:text-properties fo:language="en" fo:country="US" fo:font-style="italic" officeooo:rsid="0015098b" officeooo:paragraph-rsid="00057cdc" style:font-style-asian="italic" style:font-style-complex="italic"/>
    </style:style>
    <style:style style:name="P19" style:family="paragraph" style:parent-style-name="Standard" style:list-style-name="L1">
      <style:text-properties fo:language="en" fo:country="US" officeooo:rsid="0015098b" officeooo:paragraph-rsid="0004c23a"/>
    </style:style>
    <style:style style:name="T1" style:family="text">
      <style:text-properties fo:language="en" fo:country="US" officeooo:rsid="00164d26"/>
    </style:style>
    <style:style style:name="T2" style:family="text">
      <style:text-properties fo:language="ru" fo:country="RU" officeooo:rsid="0004c23a"/>
    </style:style>
    <style:style style:name="T3" style:family="text">
      <style:text-properties style:font-name="Liberation Serif" fo:font-size="18pt" officeooo:rsid="0002e3a6" style:font-name-asian="Microsoft YaHei" style:font-size-asian="18pt" style:font-size-complex="18pt"/>
    </style:style>
    <style:style style:name="T4" style:family="text">
      <style:text-properties officeooo:rsid="00057cdc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_1" table:style-name="Таблица2_5f_1">
        <table:table-column table:style-name="Таблица2_5f_1.A"/>
        <table:table-column table:style-name="Таблица2_5f_1.B"/>
        <table:table-row>
          <table:table-cell table:style-name="Таблица2_5f_1.A1" office:value-type="string">
            <text:p text:style-name="P1">ФАКУЛЬТЕТ</text:p>
          </table:table-cell>
          <table:table-cell table:style-name="Таблица2_5f_1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_5f_1.A1" office:value-type="string">
            <text:p text:style-name="P1">КАФЕДРА</text:p>
          </table:table-cell>
          <table:table-cell table:style-name="Таблица2_5f_1.B1" office:value-type="string">
            <text:p text:style-name="P3">Защита информации</text:p>
          </table:table-cell>
        </table:table-row>
      </table:table>
      <text:p text:style-name="P4"/>
      <text:p text:style-name="P4"/>
      <text:p text:style-name="P4"/>
      <text:p text:style-name="P4"/>
      <text:p text:style-name="P5">ОТЧЕТ<text:line-break/>о лабораторной работе № <text:span text:style-name="T1">1</text:span><text:span text:style-name="T2">7</text:span></text:p>
      <text:p text:style-name="P4"/>
      <text:p text:style-name="P6">«<text:span text:style-name="T3">Базовое администрирование Linux с использованием Python</text:span>»</text:p>
      <text:p text:style-name="P7"/>
      <text:p text:style-name="P7"/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1">4</text:span>9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10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группа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4"><text:a xlink:type="simple" xlink:href="#__RefHeading___Toc659_2355785664" office:name="Теоретическая часть" text:style-name="Index_20_Link" text:visited-style-name="Index_20_Link">Теоретическая часть<text:tab/>3</text:a></text:p>
          <text:p text:style-name="P15"><text:a xlink:type="simple" xlink:href="#__RefHeading___Toc661_2355785664" office:name="Управление пакетами Python с помощью pip3" text:style-name="Index_20_Link" text:visited-style-name="Index_20_Link">Управление пакетами Python с помощью pip3<text:tab/>3</text:a></text:p>
          <text:p text:style-name="P15"><text:a xlink:type="simple" xlink:href="#__RefHeading___Toc663_2355785664" office:name="Виртуальное окружение (venv)" text:style-name="Index_20_Link" text:visited-style-name="Index_20_Link">Виртуальное окружение (venv)<text:tab/>3</text:a></text:p>
          <text:p text:style-name="P15"><text:a xlink:type="simple" xlink:href="#__RefHeading___Toc665_2355785664" office:name="Используемые библиотеки" text:style-name="Index_20_Link" text:visited-style-name="Index_20_Link">Используемые библиотеки<text:tab/>4</text:a></text:p>
          <text:p text:style-name="P14"><text:a xlink:type="simple" xlink:href="#__RefHeading___Toc667_2355785664" office:name="Постановка задачи" text:style-name="Index_20_Link" text:visited-style-name="Index_20_Link">Постановка задачи<text:tab/>4</text:a></text:p>
          <text:p text:style-name="P14"><text:a xlink:type="simple" xlink:href="#__RefHeading___Toc669_2355785664" office:name="Листинг программы" text:style-name="Index_20_Link" text:visited-style-name="Index_20_Link">Листинг программы<text:tab/></text:a><text:span text:style-name="T4">4</text:span></text:p>
          <text:p text:style-name="P14"><text:a xlink:type="simple" xlink:href="#__RefHeading___Toc671_235578566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-start text:name="__RefHeading___Toc659_2355785664"/><text:soft-page-break/>Теоретическая часть<text:bookmark-end text:name="__RefHeading___Toc659_2355785664"/></text:h>
      <text:h text:style-name="Heading_20_2" text:outline-level="2"><text:bookmark-start text:name="__RefHeading___Toc661_2355785664"/>Управление пакетами Python с помощью pip3<text:bookmark-end text:name="__RefHeading___Toc661_2355785664"/></text:h>
      <text:p text:style-name="P13"/>
      <text:p text:style-name="P13">pip3 (Pip Installs Packages) — это стандартный менеджер пакетов для Python 3, позволяющий устанавливать, обновлять и удалять сторонние библиотеки. В операционной системе Astra Linux работа с pip3 имеет свои особенности, связанные с политикой безопасности.</text:p>
      <text:p text:style-name="P13"/>
      <text:p text:style-name="P13">Основные команды pip3:</text:p>
      <text:p text:style-name="P13"/>
      <text:p text:style-name="P16">| `pip3 install package` | Установка пакета |</text:p>
      <text:p text:style-name="P16">| `pip3 install --user package` | Установка для текущего пользователя |</text:p>
      <text:p text:style-name="P16">| `pip3 uninstall package` | Удаление пакета |</text:p>
      <text:p text:style-name="P16">| `pip3 list` | Список установленных пакетов |</text:p>
      <text:p text:style-name="P16">| `pip3 show package` | Информация о пакете |</text:p>
      <text:p text:style-name="P13"/>
      <text:h text:style-name="Heading_20_2" text:outline-level="2"><text:bookmark-start text:name="__RefHeading___Toc663_2355785664"/>Виртуальное окружение (venv)<text:bookmark-end text:name="__RefHeading___Toc663_2355785664"/></text:h>
      <text:p text:style-name="P13"/>
      <text:p text:style-name="P13">При работе с Python в Astra Linux настоятельно рекомендуется использовать виртуальные окружения. Это позволяет изолировать проекты друг от друга и избежать конфликтов с системными пакетами.</text:p>
      <text:p text:style-name="P13"/>
      <text:p text:style-name="P13">Преимущества виртуального окружения:</text:p>
      <text:p text:style-name="P13">- Независимость версий библиотек для разных проектов</text:p>
      <text:p text:style-name="P13">- Отсутствие необходимости в правах суперпользователя (sudo)</text:p>
      <text:p text:style-name="P13">- Чистота системного Python</text:p>
      <text:p text:style-name="P13">- Лёгкое воспроизведение окружения на других машинах</text:p>
      <text:p text:style-name="P13"/>
      <text:p text:style-name="P13">Создание и активация виртуального окружения:</text:p>
      <text:p text:style-name="P13"/>
      <text:p text:style-name="P17">```</text:p>
      <text:p text:style-name="P18">bash</text:p>
      <text:p text:style-name="P16"># Установка venv (если отсутствует)</text:p>
      <text:p text:style-name="P16">sudo apt install python3-venv</text:p>
      <text:p text:style-name="P16"/>
      <text:p text:style-name="P16"># Создание окружения в папке проекта</text:p>
      <text:p text:style-name="P16">python3 -m venv myen</text:p>
      <text:p text:style-name="P16"/>
      <text:p text:style-name="P16"># Активация окружения</text:p>
      <text:p text:style-name="P16">source myen/bin/activate</text:p>
      <text:p text:style-name="P16"><text:soft-page-break/></text:p>
      <text:p text:style-name="P16"># Выход из окружения</text:p>
      <text:p text:style-name="P16">deactivate</text:p>
      <text:p text:style-name="P13">```</text:p>
      <text:p text:style-name="P13"/>
      <text:p text:style-name="P13">Для лабораторной работы №17 необходимо установить следующие библиотеки:</text:p>
      <text:p text:style-name="P13"/>
      <text:p text:style-name="P13"><text:span text:style-name="T5">```</text:span></text:p>
      <text:p text:style-name="P16">bash</text:p>
      <text:p text:style-name="P16">pip install psutil paramiko schedule</text:p>
      <text:p text:style-name="P16">```</text:p>
      <text:p text:style-name="P13"/>
      <text:h text:style-name="Heading_20_2" text:outline-level="2"><text:bookmark-start text:name="__RefHeading___Toc665_2355785664"/>Используемые библиотеки<text:bookmark-end text:name="__RefHeading___Toc665_2355785664"/></text:h>
      <text:p text:style-name="P13"/>
      <text:p text:style-name="P16">| `subprocess` | Выполнение системных команд (встроенная) |</text:p>
      <text:p text:style-name="P16">| `os` | Работа с операционной системой (встроенная) |</text:p>
      <text:p text:style-name="P16">| `shutil` | Копирование и перемещение файлов (встроенная) |</text:p>
      <text:p text:style-name="P16">| `psutil` | Мониторинг процессов и ресурсов системы |</text:p>
      <text:p text:style-name="P16">| `paramiko` | Удалённое подключение по SSH |</text:p>
      <text:p text:style-name="P16">| `schedule` | Планирование задач по расписанию |</text:p>
      <text:p text:style-name="P13"/>
      <text:h text:style-name="Heading_20_1" text:outline-level="1"><text:bookmark-start text:name="__RefHeading___Toc667_2355785664"/>Постановка задачи<text:bookmark-end text:name="__RefHeading___Toc667_2355785664"/></text:h>
      <text:p text:style-name="P13"/>
      <text:p text:style-name="P13">1. Написать программы на языке программирования Python, которые:</text:p>
      <text:p text:style-name="P13"><text:s text:c="3"/>- создают и удаляют пользователей;</text:p>
      <text:p text:style-name="P13"><text:s text:c="3"/>- копируют и удаляют файлы;</text:p>
      <text:p text:style-name="P13"><text:s text:c="3"/>- выводят данные о загрузке процессора, оперативной памяти и диска, а также список запущенных процессов;</text:p>
      <text:p text:style-name="P13"><text:s text:c="3"/>- запускают выполнение задачи по расписанию;</text:p>
      <text:p text:style-name="P13"><text:s text:c="3"/>- выполняют резервную копию данных и изменяют права доступа.</text:p>
      <text:p text:style-name="P13"/>
      <text:p text:style-name="P13">2. Оформить отчёт.</text:p>
      <text:p text:style-name="P13"/>
      <text:h text:style-name="Heading_20_1" text:outline-level="1"><text:bookmark-start text:name="__RefHeading___Toc669_2355785664"/>Листинг программы<text:bookmark-end text:name="__RefHeading___Toc669_2355785664"/></text:h>
      <text:p text:style-name="P13"/>
      <text:p text:style-name="P13">Исходный код программы размещён в репозитории GitHub:</text:p>
      <text:p text:style-name="P13"><text:a xlink:type="simple" xlink:href="https://github.com/MRKoret/BMSTU_Python_Lebedev_A_V" text:style-name="Internet_20_link" text:visited-style-name="Visited_20_Internet_20_Link">https://github.com/MRKoret/BMSTU_Python_Lebedev_AV</text:a></text:p>
      <text:p text:style-name="P13"/>
      <text:h text:style-name="Heading_20_1" text:outline-level="1"><text:bookmark-start text:name="__RefHeading___Toc671_2355785664"/><text:soft-page-break/>Список использованной литературы и материалов<text:bookmark-end text:name="__RefHeading___Toc671_2355785664"/></text:h>
      <text:p text:style-name="P13"/>
      <text:list text:style-name="L1">
        <text:list-item>
          <text:p text:style-name="P19">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  </text:list-item>
        <text:list-item>
          <text:p text:style-name="P19">Брюс М. Ван Хорн II, Куан Нгуен. PyCharm: профессиональная работа на Python / пер. с англ. И.Л. Люско. – М.:ДМК Пресс, 2024. – 618 с.: ил.</text:p>
        </text:list-item>
        <text:list-item>
          <text:p text:style-name="P19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19">Git. — Текст : электронный // Git : [сайт]. — URL: https://git-scm.com/ (дата обращения: 14.09.2025).</text:p>
        </text:list-item>
        <text:list-item>
          <text:p text:style-name="P19">GitHub. — Текст : электронный // GitHub : [сайт]. — URL: https://github.com/ (дата обращения: 14.09.2025).</text:p>
        </text:list-item>
        <text:list-item>
          <text:p text:style-name="P19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  <text:list-item>
          <text:p text:style-name="P19">Документация psutil. — Текст : электронный // PyPI : [сайт]. — URL: https://pypi.org/project/psutil/ (дата обращения: 29.05.2026).</text:p>
        </text:list-item>
        <text:list-item>
          <text:p text:style-name="P19">Документация schedule. — Текст : электронный // PyPI : [сайт]. — URL: https://pypi.org/project/schedule/ (дата обращения: 29.05.2026).</text:p>
        </text:list-item>
        <text:list-item>
          <text:p text:style-name="P19">Документация paramiko. — Текст : электронный // PyPI : [сайт]. — URL: https://pypi.org/project/paramiko/ (дата обращения: 29.05.2026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fo:language="en" fo:country="US" officeooo:rsid="00164d26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<text:span text:style-name="MT1">6</text:span>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 Копия 1"/><text:page-number text:select-page="current">2</text:page-number><text:bookmark-end text:name="PageNumWizard_HEADER_Первая страница2 Копия 1"/></text:p>
      </style:head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6T09:37:41.177884300</meta:creation-date>
    <dc:date>2026-06-06T09:53:26.628580200</dc:date>
    <meta:editing-duration>PT5M21S</meta:editing-duration>
    <meta:editing-cycles>1</meta:editing-cycles>
    <meta:document-statistic meta:table-count="3" meta:image-count="1" meta:object-count="0" meta:page-count="5" meta:paragraph-count="91" meta:word-count="593" meta:character-count="4412" meta:non-whitespace-character-count="3884"/>
    <meta:generator>LibreOffice/25.8.6.2$Windows_X86_64 LibreOffice_project/b4b39682cd9868fa725bc664aff94278d315bd04</meta:generator>
  </office:meta>
</office:document-meta>
</file>