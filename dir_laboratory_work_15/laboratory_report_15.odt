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_5f_1" style:display-name="Таблица2_1" style:family="table" style:master-page-name="Титульный_20_лист">
      <style:table-properties style:width="17.978cm" style:page-number="auto" table:align="right"/>
    </style:style>
    <style:style style:name="Таблица2_5f_1.A" style:display-name="Таблица2_1.A" style:family="table-column">
      <style:table-column-properties style:column-width="4.397cm"/>
    </style:style>
    <style:style style:name="Таблица2_5f_1.B" style:display-name="Таблица2_1.B" style:family="table-column">
      <style:table-column-properties style:column-width="13.58cm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fo:color="#111111" loext:opacity="100%" style:font-name="Liberation Serif1" officeooo:rsid="0013d4ff" officeooo:paragraph-rsid="000a313a"/>
    </style:style>
    <style:style style:name="P2" style:family="paragraph" style:parent-style-name="Содержимое_20_таблицы_20_по_20_центру">
      <style:text-properties fo:color="#111111" loext:opacity="100%" style:font-name="Liberation Serif1" officeooo:rsid="0017c942" officeooo:paragraph-rsid="000a313a"/>
    </style:style>
    <style:style style:name="P3" style:family="paragraph" style:parent-style-name="Содержимое_20_таблицы_20_по_20_центру">
      <style:text-properties fo:color="#111111" loext:opacity="100%" style:font-name="Liberation Serif1" officeooo:rsid="00196614" officeooo:paragraph-rsid="000a313a"/>
    </style:style>
    <style:style style:name="P4" style:family="paragraph" style:parent-style-name="Standard">
      <style:text-properties fo:color="#111111" loext:opacity="100%" style:font-name="Liberation Serif1" officeooo:paragraph-rsid="000a313a"/>
    </style:style>
    <style:style style:name="P5" style:family="paragraph" style:parent-style-name="Title">
      <style:text-properties fo:color="#111111" loext:opacity="100%" style:font-name="Liberation Serif1" officeooo:rsid="0015098b" officeooo:paragraph-rsid="000a313a"/>
    </style:style>
    <style:style style:name="P6" style:family="paragraph" style:parent-style-name="Subtitle">
      <style:text-properties fo:color="#111111" loext:opacity="100%" style:font-name="Liberation Serif1" officeooo:paragraph-rsid="000a313a"/>
    </style:style>
    <style:style style:name="P7" style:family="paragraph" style:parent-style-name="Text_20_body">
      <style:text-properties fo:color="#111111" loext:opacity="100%" style:font-name="Liberation Serif1" fo:language="en" fo:country="US" officeooo:rsid="0015098b" officeooo:paragraph-rsid="000a313a"/>
    </style:style>
    <style:style style:name="P8" style:family="paragraph" style:parent-style-name="Table_20_Contents">
      <style:text-properties fo:color="#111111" loext:opacity="100%" style:font-name="Liberation Serif1" officeooo:rsid="0015098b" officeooo:paragraph-rsid="000a313a"/>
    </style:style>
    <style:style style:name="P9" style:family="paragraph" style:parent-style-name="Table_20_Contents">
      <style:text-properties fo:color="#111111" loext:opacity="100%" style:font-name="Liberation Serif1" officeooo:paragraph-rsid="000a313a"/>
    </style:style>
    <style:style style:name="P10" style:family="paragraph" style:parent-style-name="Содержимое_20_таблицы_20_по_20_центру">
      <style:text-properties fo:color="#111111" loext:opacity="100%" style:font-name="Liberation Serif1" fo:language="ru" fo:country="RU" officeooo:rsid="00057a0e" officeooo:paragraph-rsid="000a313a"/>
    </style:style>
    <style:style style:name="P11" style:family="paragraph" style:parent-style-name="Примечание">
      <style:text-properties fo:color="#111111" loext:opacity="100%" style:font-name="Liberation Serif1" officeooo:paragraph-rsid="000a313a"/>
    </style:style>
    <style:style style:name="P12" style:family="paragraph" style:parent-style-name="Примечание">
      <style:text-properties fo:color="#111111" loext:opacity="100%" style:font-name="Liberation Serif1" officeooo:rsid="0015098b" officeooo:paragraph-rsid="000a313a"/>
    </style:style>
    <style:style style:name="P13" style:family="paragraph" style:parent-style-name="Standard">
      <style:text-properties fo:color="#111111" loext:opacity="100%" style:font-name="Liberation Serif1" fo:language="en" fo:country="US" officeooo:rsid="0015098b" officeooo:paragraph-rsid="000a313a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fo:font-size="14pt" style:font-size-asian="14pt" style:font-size-complex="14pt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0a313a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0a313a"/>
    </style:style>
    <style:style style:name="T5" style:family="text">
      <style:text-properties fo:font-variant="normal" fo:text-transform="none" style:font-name="Liberation Serif1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Liberation Serif1" fo:font-size="14pt" fo:letter-spacing="normal" fo:font-style="normal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Liberation Serif1" fo:font-size="14pt" fo:letter-spacing="normal" fo:font-style="normal" style:text-underline-style="none" fo:font-weight="normal" style:text-blinking="false" style:font-size-asian="14pt" style:font-size-complex="14pt" loext:padding="0.049cm" loext:border-left="1.5pt solid #ffffff" loext:border-right="1.5pt solid #ffffff" loext:border-top="0.74pt solid #ffffff" loext:border-bottom="0.74pt solid #fffff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0.37cm" svg:y="0.37cm" svg:width="0.741cm" draw:z-index="1">
        <draw:text-box fo:min-height="0.741cm">
          <text:p text:style-name="P20"/>
        </draw:text-box>
      </draw:frame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3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P5">ОТЧЕТ<text:line-break/>о лабораторной работе № <text:span text:style-name="T1">1</text:span><text:span text:style-name="T2">5</text:span></text:p>
      <text:p text:style-name="P4"/>
      <text:p text:style-name="P6"><text:span text:style-name="T3">«</text:span><text:span text:style-name="T4">Реализация динамического списка</text:span><text:span text:style-name="T3">»</text:span></text:p>
      <text:p text:style-name="P7"/>
      <text:p text:style-name="P7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"><text:a xlink:type="simple" xlink:href="#__RefHeading___Toc714_3895415743" office:name="Постановка задачи" text:style-name="Index_20_Link" text:visited-style-name="Index_20_Link">Постановка задачи<text:tab/>3</text:a></text:p>
          <text:p text:style-name="P14"><text:a xlink:type="simple" xlink:href="#__RefHeading___Toc716_3895415743" office:name="Теоретическая часть" text:style-name="Index_20_Link" text:visited-style-name="Index_20_Link">Теоретическая часть<text:tab/>3</text:a></text:p>
          <text:p text:style-name="P14"><text:a xlink:type="simple" xlink:href="#__RefHeading___Toc718_3895415743" office:name="Листинг программы" text:style-name="Index_20_Link" text:visited-style-name="Index_20_Link">Листинг программы<text:tab/>4</text:a></text:p>
          <text:p text:style-name="P14"><text:a xlink:type="simple" xlink:href="#__RefHeading___Toc720_3895415743" office:name="Результат работы программы" text:style-name="Index_20_Link" text:visited-style-name="Index_20_Link">Результат работы программы<text:tab/>4</text:a></text:p>
          <text:p text:style-name="P14"><text:a xlink:type="simple" xlink:href="#__RefHeading___Toc722_3895415743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714_3895415743"/><text:soft-page-break/>Постановка задачи<text:bookmark-end text:name="__RefHeading___Toc714_3895415743"/></text:h>
      <text:list text:style-name="L1">
        <text:list-item>
          <text:p text:style-name="P15">Реализовать собственный класс MyList, эмулирующий работу встроенного динамического массива (списка) Python.</text:p>
        </text:list-item>
        <text:list-item>
          <text:p text:style-name="P15">Реализовать метод insert(index, item) для вставки элемента в произвольное место списка.</text:p>
        </text:list-item>
        <text:list-item>
          <text:p text:style-name="P15">Реализовать метод delete(index) для удаления элемента из произвольного места списка.</text:p>
        </text:list-item>
        <text:list-item>
          <text:p text:style-name="P16"><text:span text:style-name="T5">Реализовать дополнительные методы: pop(), remove(), clear(), index(), </text:span><text:span text:style-name="Strong_20_Emphasis"><text:span text:style-name="T6">contains</text:span></text:span><text:span text:style-name="T5">, </text:span><text:span text:style-name="Strong_20_Emphasis"><text:span text:style-name="T6">setitem</text:span></text:span><text:span text:style-name="T5">, </text:span><text:span text:style-name="Strong_20_Emphasis"><text:span text:style-name="T6">getitem</text:span></text:span><text:span text:style-name="T5">.</text:span></text:p>
        </text:list-item>
        <text:list-item>
          <text:p text:style-name="P15">Обеспечить поддержку отрицательных индексов.</text:p>
        </text:list-item>
        <text:list-item>
          <text:p text:style-name="P15">Реализовать автоматическое изменение ёмкости массива при добавлении и удалении элементов.</text:p>
        </text:list-item>
        <text:list-item>
          <text:p text:style-name="P15">Продемонстрировать работу всех методов на тестовых примерах.</text:p>
        </text:list-item>
      </text:list>
      <text:h text:style-name="Heading_20_1" text:outline-level="1"><text:bookmark-start text:name="__RefHeading___Toc716_3895415743"/>Теоретическая часть<text:bookmark-end text:name="__RefHeading___Toc716_3895415743"/></text:h>
      <text:p text:style-name="Text_20_body">Динамический массив — это структура данных, которая автоматически изменяет свой размер при добавлении или удалении элементов. В отличие от статического массива, размер которого фиксирован, динамический массив может расширяться или сжиматься по мере необходимости.</text:p>
      <text:p text:style-name="Text_20_body">Основные операции и их вычислительная сложность:</text:p>
      <text:list text:style-name="L2">
        <text:list-item>
          <text:p text:style-name="P17">Доступ к элементу по индексу;</text:p>
        </text:list-item>
        <text:list-item>
          <text:p text:style-name="P17">Добавление элемента в конец (амортизированное);</text:p>
        </text:list-item>
        <text:list-item>
          <text:p text:style-name="P17">Вставка элемента в произвольное место;</text:p>
        </text:list-item>
        <text:list-item>
          <text:p text:style-name="P17">Удаление элемента из произвольного места.</text:p>
        </text:list-item>
      </text:list>
      <text:p text:style-name="Text_20_body">Для низкоуровневой работы с памятью в Python используется модуль ctypes, позволяющий создавать массивы фиксированного размера с элементами типа py_object (что позволяет хранить любые объекты Python).</text:p>
      <text:p text:style-name="Text_20_body">Стратегия изменения размера (capacity):</text:p>
      <text:list text:style-name="L3">
        <text:list-item>
          <text:p text:style-name="P18">При добавлении элемента в заполненный массив: увеличение ёмкости в 2 раза;</text:p>
        </text:list-item>
        <text:list-item>
          <text:p text:style-name="P18"><text:soft-page-break/>При удалении, если количество элементов становится меньше или равно половине ёмкости: уменьшение ёмкости до половины (но не менее начального размера 8).</text:p>
        </text:list-item>
      </text:list>
      <text:p text:style-name="Text_20_body">Поддержка отрицательных индексов реализуется преобразованием отрицательного индекса в положительный по формуле: index = длина_списка + отрицательный_индекс. Например, индекс -1 соответствует последнему элементу.</text:p>
      <text:h text:style-name="Heading_20_1" text:outline-level="1"><text:bookmark-start text:name="__RefHeading___Toc718_3895415743"/>Листинг программы<text:bookmark-end text:name="__RefHeading___Toc718_3895415743"/></text:h>
      <text:p text:style-name="Text_20_body"><text:span text:style-name="T5">Полный исходный код программы размещён в репозитории GitHub:<text:line-break/></text:span><text:a xlink:type="simple" xlink:href="https://github.com/MRKoret/BMSTU_Python_LebedevAV" office:target-frame-name="_blank" xlink:show="new" text:style-name="Internet_20_link" text:visited-style-name="Visited_20_Internet_20_Link"><text:span text:style-name="T7">https://github.com/MRKoret/BMSTU_Python_LebedevAV</text:span></text:a></text:p>
      <text:h text:style-name="Heading_20_1" text:outline-level="1"><text:bookmark-start text:name="__RefHeading___Toc720_3895415743"/>Результат работы программы<text:bookmark-end text:name="__RefHeading___Toc720_3895415743"/></text:h>
      <text:p text:style-name="Text_20_body">Результатом работы программы является вывод на экран демонстрации всех методов класса MyList и сравнение с встроенным списком Python.</text:p>
      <text:h text:style-name="Heading_20_1" text:outline-level="1"><text:bookmark-start text:name="__RefHeading___Toc722_3895415743"/>Список использованной литературы и материалов<text:bookmark-end text:name="__RefHeading___Toc722_3895415743"/></text:h>
      <text:list text:style-name="L4">
        <text:list-item>
          <text:p text:style-name="P19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19">Брюс М. Ван Хорн II, Куан Нгуен. PyCharm: профессиональная работа на Python / пер. с англ. И.Л. Люско. – М.:ДМК Пресс, 2024. – 618 с.: ил.</text:p>
        </text:list-item>
        <text:list-item>
          <text:p text:style-name="P19"><text:span text:style-name="T5">Welcome to </text:span><text:a xlink:type="simple" xlink:href="https://python.org/" office:target-frame-name="_blank" xlink:show="new" text:style-name="Internet_20_link" text:visited-style-name="Visited_20_Internet_20_Link"><text:span text:style-name="T7">python.org</text:span></text:a><text:span text:style-name="T5">. — Текст : электронный // The official home of the Python Programming Language : [сайт]. — URL: </text:span><text:a xlink:type="simple" xlink:href="https://www.python.org/" office:target-frame-name="_blank" xlink:show="new" text:style-name="Internet_20_link" text:visited-style-name="Visited_20_Internet_20_Link"><text:span text:style-name="T7">https://www.python.org/</text:span></text:a><text:span text:style-name="T5"> (дата обращения: 14.09.2025).</text:span></text:p>
        </text:list-item>
        <text:list-item>
          <text:p text:style-name="P19"><text:span text:style-name="T5">Git. — Текст : электронный // Git : [сайт]. — URL: </text:span><text:a xlink:type="simple" xlink:href="https://git-scm.com/" office:target-frame-name="_blank" xlink:show="new" text:style-name="Internet_20_link" text:visited-style-name="Visited_20_Internet_20_Link"><text:span text:style-name="T7">https://git-scm.com/</text:span></text:a><text:span text:style-name="T5"> (дата обращения: 14.09.2025).</text:span></text:p>
        </text:list-item>
        <text:list-item>
          <text:p text:style-name="P19"><text:span text:style-name="T5">GitHub. — Текст : электронный // GitHub : [сайт]. — URL: </text:span><text:a xlink:type="simple" xlink:href="https://github.com/" office:target-frame-name="_blank" xlink:show="new" text:style-name="Internet_20_link" text:visited-style-name="Visited_20_Internet_20_Link"><text:span text:style-name="T7">https://github.com/</text:span></text:a><text:span text:style-name="T5"> (дата обращения: 14.09.2025).</text:span></text:p>
        </text:list-item>
        <text:list-item>
          <text:p text:style-name="P19"><text:span text:style-name="T5">PyCharm: The only Python IDE you need. — Текст : электронный // JetBrains: Essential tools for software developers and teams : [сайт]. — URL: </text:span><text:a xlink:type="simple" xlink:href="https://www.jetbrains.com/pycharm/" office:target-frame-name="_blank" xlink:show="new" text:style-name="Internet_20_link" text:visited-style-name="Visited_20_Internet_20_Link"><text:span text:style-name="T7">https://www.jetbrains.com/pycharm/</text:span></text:a><text:span text:style-name="T5"> (дата обращения: 14.09.2025).</text:span></text:p>
        </text:list-item>
      </text:list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5T10:46:20.598024400</meta:creation-date>
    <dc:date>2026-05-15T11:05:12.047806300</dc:date>
    <meta:editing-duration>PT8M39S</meta:editing-duration>
    <meta:editing-cycles>1</meta:editing-cycles>
    <meta:document-statistic meta:table-count="3" meta:image-count="1" meta:object-count="0" meta:page-count="5" meta:paragraph-count="60" meta:word-count="474" meta:character-count="3719" meta:non-whitespace-character-count="3307"/>
    <meta:generator>LibreOffice/25.8.6.2$Windows_X86_64 LibreOffice_project/b4b39682cd9868fa725bc664aff94278d315bd04</meta:generator>
  </office:meta>
</office:document-meta>
</file>